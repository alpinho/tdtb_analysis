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0.7807in"/>
    </style:style>
    <style:style style:name="co5" style:family="table-column">
      <style:table-column-properties fo:break-before="auto" style:column-width="1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bb6"/>
      <style:text-properties fo:color="#069a2e"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bb6"/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69a2e" fo:font-weight="bold" style:font-weight-asian="bold" style:font-weight-complex="bold"/>
    </style:style>
    <style:style style:name="ce3" style:family="table-cell" style:parent-style-name="Default"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ROI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Default"/>
        <table:table-column table:style-name="co2" table:number-columns-repeated="16379" table:default-cell-style-name="ce5"/>
        <table:table-row table:style-name="ro1">
          <table:table-cell table:style-name="Default" office:value-type="string" calcext:value-type="string">
            <text:p>ROIS</text:p>
          </table:table-cell>
          <table:table-cell table:style-name="Default" office:value-type="string" calcext:value-type="string">
            <text:p>Modality</text:p>
          </table:table-cell>
          <table:table-cell table:style-name="Default" office:value-type="string" calcext:value-type="string">
            <text:p>Effect</text:p>
          </table:table-cell>
          <table:table-cell table:style-name="Default"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L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style-name="ce5" office:value-type="string" calcext:value-type="string">
            <text:p>anova interaction significant for all levels of individualization | Production &gt; NTFD and Production &gt; Perception in dstr and cereb for all levels of individualization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style-name="ce5" office:value-type="string" calcext:value-type="string">
            <text:p>anova interaction significant for all levels of individualization | Production &gt; NTFD and Production &gt; Perception in dstr and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5" office:value-type="string" calcext:value-type="string">
            <text:p>anova interaction significant for all levels of individualization | Production &gt; NTFD and Production &gt; Perception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" office:value-type="string" calcext:value-type="string">
            <text:p>anova interaction significant for all levels of individualization | Perception &gt; NTFD in dstr for levels of individualization from “i8a” to “g”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" office:value-type="string" calcext:value-type="string">
            <text:p>anova interaction significant for all levels of individualization | Perception &gt; NTFD in cereb for all levels of individualization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style-name="ce5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5" office:value-type="string" calcext:value-type="string">
            <text:p>anova interaction significant for all levels of individualization | Production &gt; NTFD and Production &gt; Perception in cereb for levels of individualization from “i” to “a” and “a4g”</text:p>
          </table:table-cell>
          <table:table-cell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L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style-name="ce7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NTFD in cereb for levels of individualization from “i9a” to “a”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Perception in cereb for levels of individualization from “i9a” and “i8a”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style-name="ce5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NTFD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Perception in cereb for levels of individualization from “i” and “i8a”</text:p>
          </table:table-cell>
          <table:table-cell table:number-columns-repeated="16379"/>
        </table:table-row>
        <table:table-row table:style-name="ro1">
          <table:table-cell table:style-name="ce6" table:number-columns-repeated="4"/>
          <table:table-cell table:style-name="ce8" office:value-type="string" calcext:value-type="string">
            <text:p>anova interaction significant for all levels of individualization | Perception &gt; NTFD in cereb for levels of individualization from “i9a” and “a”</text:p>
          </table:table-cell>
          <table:table-cell table:style-name="ce6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style-name="ce5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BH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LH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RH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ROI x Task</text:p>
          </table:table-cell>
          <table:table-cell table:style-name="Default" office:value-type="string" calcext:value-type="string">
            <text:p>BH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ROI x Task</text:p>
          </table:table-cell>
          <table:table-cell table:style-name="Default" office:value-type="string" calcext:value-type="string">
            <text:p>LH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visual</text:p>
          </table:table-cell>
          <table:table-cell table:style-name="Default" office:value-type="string" calcext:value-type="string">
            <text:p>ROI x Task</text:p>
          </table:table-cell>
          <table:table-cell table:style-name="Default" office:value-type="string" calcext:value-type="string">
            <text:p>RH</text:p>
          </table:table-cell>
          <table:table-cell/>
          <table:table-cell table:style-name="Default" table:number-columns-repeated="16379"/>
        </table:table-row>
      </table:table>
      <table:table table:name="8 ROI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 table:number-rows-repeated="18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1"/>
        </table:table-row>
        <table:table-row table:style-name="ro1" table:number-rows-repeated="19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20:06:15.868644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 Luísa Pinho</meta:initial-creator>
    <meta:creation-date>2025-08-29T17:27:54.141637048</meta:creation-date>
    <dc:date>2025-09-04T22:06:55.787458493</dc:date>
    <dc:creator>Ana Luísa Pinho</dc:creator>
    <meta:editing-duration>PT9H39M1S</meta:editing-duration>
    <meta:editing-cycles>81</meta:editing-cycles>
    <meta:generator>LibreOffice/24.2.7.2$Linux_X86_64 LibreOffice_project/420$Build-2</meta:generator>
    <meta:document-statistic meta:table-count="2" meta:cell-count="156" meta:object-count="0"/>
  </office:meta>
</office:document-meta>
</file>