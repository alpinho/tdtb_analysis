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0.7807in"/>
    </style:style>
    <style:style style:name="co5" style:family="table-column">
      <style:table-column-properties fo:break-before="auto" style:column-width="1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bb6"/>
      <style:text-properties fo:color="#069a2e"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bb6"/>
      <style:text-properties fo:color="#069a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69a2e" fo:font-weight="bold" style:font-weight-asian="bold" style:font-weight-complex="bold"/>
    </style:style>
    <style:style style:name="ce3" style:family="table-cell" style:parent-style-name="Default">
      <style:text-properties fo:color="#069a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 ROI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16379" table:default-cell-style-name="ce5"/>
        <table:table-row table:style-name="ro1">
          <table:table-cell table:style-name="Default" office:value-type="string" calcext:value-type="string">
            <text:p>ROIS</text:p>
          </table:table-cell>
          <table:table-cell table:style-name="Default" office:value-type="string" calcext:value-type="string">
            <text:p>Modality</text:p>
          </table:table-cell>
          <table:table-cell table:style-name="Default" office:value-type="string" calcext:value-type="string">
            <text:p>Effect</text:p>
          </table:table-cell>
          <table:table-cell table:style-name="Default" office:value-type="string" calcext:value-type="string">
            <text:p>Hemisphere</text:p>
          </table:table-cell>
          <table:table-cell table:style-name="Default" office:value-type="string" calcext:value-type="string">
            <text:p>Results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L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all levels of individualization | Production &gt; NTFD and Production &gt; Perception in dstr and cereb for all levels of individualization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Production &gt; NTFD and Production &gt; Perception in dstr and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nova interaction significant for all levels of individualization | Production &gt; NTFD and Production &gt; Perception in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6" office:value-type="string" calcext:value-type="string">
            <text:p>anova interaction significant for all levels of individualization | Perception &gt; NTFD in dstr for levels of individualization from “i8a” to “g”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6" office:value-type="string" calcext:value-type="string">
            <text:p>anova interaction significant for all levels of individualization | Perception &gt; NTFD in cereb for all levels of individualization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nova interaction significant for all levels of individualization | Production &gt; NTFD and Production &gt; Perception in cereb for levels of individualization from “i” to “a” and “a4g”</text:p>
          </table:table-cell>
          <table:table-cell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di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di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L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ditory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style-name="ce7"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NTFD in cereb for levels of individualization from “i9a” to “a”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Perception in cereb for levels of individualization from “i9a” and “i8a”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NTFD in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" office:value-type="string" calcext:value-type="string">
            <text:p>anova interaction significant for all levels of individualization | Production &gt; Perception in cereb for levels of individualization from “i” and “i8a”</text:p>
          </table:table-cell>
          <table:table-cell table:number-columns-repeated="16379"/>
        </table:table-row>
        <table:table-row table:style-name="ro1">
          <table:table-cell table:style-name="ce6" table:number-columns-repeated="4"/>
          <table:table-cell table:style-name="ce8" office:value-type="string" calcext:value-type="string">
            <text:p>anova interaction significant for all levels of individualization | Perception &gt; NTFD in cereb for levels of individualization from “i9a” and “a”</text:p>
          </table:table-cell>
          <table:table-cell table:style-name="ce6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L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anova interaction significant for all levels of individualization | Production is significantly higher than both Perception and NTFD for all levels of individualization</text:p>
          </table:table-cell>
          <table:table-cell table:style-name="ce4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nova interaction significant for all levels of individualization | Production &gt; NTFD in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nova interaction significant for all levels of individualization | Production &gt; Perception in cereb for levels of individualization from i9a to i7a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6" office:value-type="string" calcext:value-type="string">
            <text:p>anova interaction significant for all levels of individualization | NTFD &gt; Perception in dstr for levels of individualization from “a4g” to “g”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nova interaction significant for all levels of individualization | Production &gt; NTFD in cereb for all levels of individualizatio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nova interaction significant for all levels of individualization | Production &gt; Perception in cereb for levels of individualization for “i8a” and from “a4g” to “g”</text:p>
          </table:table-cell>
          <table:table-cell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ROI x Task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anova interaction significant for all levels of individualization | Production &gt; NTFD and Production &gt; Perception in dstr for all levels of individualization</text:p>
          </table:table-cell>
          <table:table-cell table:style-name="ce4"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anova interaction significant for all levels of individualization | Production &gt; NTFD in cereb for levels of individualization from “i” to “a”</text:p>
          </table:table-cell>
          <table:table-cell table:style-name="ce4"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anova interaction significant for all levels of individualization | Production &gt; Perception in cereb for levels of individualization from “i9a” to “i7a”</text:p>
          </table:table-cell>
          <table:table-cell table:style-name="ce4" table:number-columns-repeated="16379"/>
        </table:table-row>
      </table:table>
      <table:table table:name="8 ROI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alit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tory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B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ROI x Task</text:p>
          </table:table-cell>
          <table:table-cell office:value-type="string" calcext:value-type="string">
            <text:p>RH</text:p>
          </table:table-cell>
          <table:table-cell table:number-columns-repeated="3"/>
        </table:table-row>
        <table:table-row table:style-name="ro1" table:number-rows-repeated="18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1"/>
        </table:table-row>
        <table:table-row table:style-name="ro1" table:number-rows-repeated="19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3"/>
        </table:table-row>
        <table:table-row table:style-name="ro1">
          <table:table-cell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40:40.427856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 Luísa Pinho</meta:initial-creator>
    <meta:creation-date>2025-08-29T17:27:54.141637048</meta:creation-date>
    <dc:date>2025-09-05T17:41:06.312425059</dc:date>
    <dc:creator>Ana Luísa Pinho</dc:creator>
    <meta:editing-duration>PT10H56M33S</meta:editing-duration>
    <meta:editing-cycles>96</meta:editing-cycles>
    <meta:generator>LibreOffice/24.2.7.2$Linux_X86_64 LibreOffice_project/420$Build-2</meta:generator>
    <meta:document-statistic meta:table-count="2" meta:cell-count="169" meta:object-count="0"/>
  </office:meta>
</office:document-meta>
</file>