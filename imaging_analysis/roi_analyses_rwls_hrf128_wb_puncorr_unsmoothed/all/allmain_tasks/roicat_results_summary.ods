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0.2016in"/>
    </style:style>
    <style:style style:name="co5" style:family="table-column">
      <style:table-column-properties fo:break-before="auto" style:column-width="10.7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69a2e" fo:font-weight="bold" style:font-weight-asian="bold" style:font-weight-complex="bold"/>
    </style:style>
    <style:style style:name="ce2" style:family="table-cell" style:parent-style-name="Default">
      <style:text-properties fo:color="#069a2e"/>
    </style:style>
    <style:style style:name="ce3" style:family="table-cell" style:parent-style-name="Default">
      <style:text-properties fo:color="#069a2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 RO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Modality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Hemisphere</text:p>
          </table:table-cell>
          <table:table-cell office:value-type="string" calcext:value-type="string">
            <text:p>Resul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anova interaction significant for levels of individualization from “i” to “a3g” | no posthoc pairwise significance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anova interaction significant for all levels of individualization | no posthoc pairwise significance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anova interaction significant for levels of individualization from “i” to “a” | no posthoc pairwise significance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anova interaction significant for all levels of individualization | no posthoc pairwise significance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table:style-name="ce1" office:value-type="string" calcext:value-type="string">
            <text:p>anova interaction significant for all levels of individualization | single dissociation in beat in dstr (pcorr significant from “i” to “i7a”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anova interaction significant for all levels of individualization | no posthoc pairwise significance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nova interaction significant for levels of individualization from “i” to “i6a” | no posthoc pairwise significan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table:style-name="ce2" office:value-type="string" calcext:value-type="string">
            <text:p>anova interaction significant for levels of individualization from “i”, <text:s/>‘i9a’, ‘i7a’, “i6a”, “a2g” and “a1g” | (Interval – Beat) for these levels of individualization signific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table:style-name="ce1" office:value-type="string" calcext:value-type="string">
            <text:p>anova interaction significant for all levels of individualization | (Interval – Beat) for all levels of individualization signific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</table:table>
      <table:table table:name="8 ROI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Modality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Hemisphere</text:p>
          </table:table-cell>
          <table:table-cell office:value-type="string" calcext:value-type="string">
            <text:p>Resul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anova interaction significant for “i8a” | no posthoc pairwise significanc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nova interaction significant for “i”, “i8a” | no posthoc pairwise significanc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table:style-name="ce1" office:value-type="string" calcext:value-type="string">
            <text:p>anova interaction significant for levels of individualization from “i” to “i8a” | single dissociation in beat in dstr (pcorr significant in “i” only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table:style-name="ce1" office:value-type="string" calcext:value-type="string">
            <text:p>anova interaction significant for levels of individualization from “i” to “i6a” <text:s/>| single dissociation in beat in dstr (pcorr significant from “i” to “i8a”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anova interaction significant for level of individualization from “I” <text:s/>| no posthoc pairwise significanc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nova interaction significant for levels of individualization from “i” to “a” and “a4g” <text:s/>| no posthoc pairwise significanc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nova interaction significant for levels of individualization from “a4g” to “g” <text:s/>| no posthoc pairwise significanc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table:style-name="ce3" office:value-type="string" calcext:value-type="string">
            <text:p>anova interaction significant for all levels of individualization | (Interval – Beat) for all levels of individualization significa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table:style-name="ce3" office:value-type="string" calcext:value-type="string">
            <text:p>anova interaction significant for all levels of individualization | (Interval – Beat) for all levels of individualization significa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table:style-name="ce3" office:value-type="string" calcext:value-type="string">
            <text:p>anova interaction significant for all levels of individualization | (Interval – Beat) for all levels of individualization significa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span text:style-name="T1">PMV (0.04</text:span>) and PreSMA (0.03) likely significant in the right hemisphere for interval vs Beat for Production task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9:26:38.8616969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a Luísa Pinho</meta:initial-creator>
    <meta:creation-date>2025-08-29T17:27:54.141637048</meta:creation-date>
    <dc:date>2025-09-05T20:29:44.475621853</dc:date>
    <dc:creator>Ana Luísa Pinho</dc:creator>
    <meta:editing-duration>PT10H15M17S</meta:editing-duration>
    <meta:editing-cycles>54</meta:editing-cycles>
    <meta:generator>LibreOffice/24.2.7.2$Linux_X86_64 LibreOffice_project/420$Build-2</meta:generator>
    <meta:document-statistic meta:table-count="2" meta:cell-count="877" meta:object-count="0"/>
  </office:meta>
</office:document-meta>
</file>